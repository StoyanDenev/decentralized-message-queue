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5391"/>
    </style:style>
    <style:style style:name="P2" style:family="paragraph" style:parent-style-name="Standard">
      <style:text-properties officeooo:rsid="000be4fd" officeooo:paragraph-rsid="000be4fd"/>
    </style:style>
    <style:style style:name="P3" style:family="paragraph" style:parent-style-name="Standard">
      <style:text-properties officeooo:paragraph-rsid="000c0e6c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officeooo:paragraph-rsid="000c0e6c"/>
    </style:style>
    <style:style style:name="P6" style:family="paragraph" style:parent-style-name="Standard">
      <style:text-properties officeooo:rsid="000e03c5" officeooo:paragraph-rsid="000e03c5"/>
    </style:style>
    <style:style style:name="T1" style:family="text">
      <style:text-properties officeooo:rsid="0003d7c4"/>
    </style:style>
    <style:style style:name="T2" style:family="text">
      <style:text-properties officeooo:rsid="0005d69c"/>
    </style:style>
    <style:style style:name="T3" style:family="text">
      <style:text-properties fo:language="bg" fo:country="BG" officeooo:rsid="000a0f66"/>
    </style:style>
    <style:style style:name="T4" style:family="text">
      <style:text-properties fo:language="bg" fo:country="BG" officeooo:rsid="000b5391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5d69c"/>
    </style:style>
    <style:style style:name="T7" style:family="text">
      <style:text-properties fo:language="en" fo:country="US" officeooo:rsid="000b5391"/>
    </style:style>
    <style:style style:name="T8" style:family="text">
      <style:text-properties fo:language="en" fo:country="US" officeooo:rsid="000be4fd"/>
    </style:style>
    <style:style style:name="T9" style:family="text">
      <style:text-properties officeooo:rsid="00093bac"/>
    </style:style>
    <style:style style:name="T10" style:family="text">
      <style:text-properties style:text-position="super 58%" officeooo:rsid="000a0f66"/>
    </style:style>
    <style:style style:name="T11" style:family="text">
      <style:text-properties style:text-position="super 58%" fo:language="en" fo:country="US" officeooo:rsid="000be4fd"/>
    </style:style>
    <style:style style:name="T12" style:family="text">
      <style:text-properties style:text-position="super 58%" fo:language="en" fo:country="US" officeooo:rsid="000e03c5"/>
    </style:style>
    <style:style style:name="T13" style:family="text">
      <style:text-properties style:text-position="super 58%" officeooo:rsid="000b5391"/>
    </style:style>
    <style:style style:name="T14" style:family="text">
      <style:text-properties style:text-position="super 58%" style:font-name="Liberation Serif" fo:font-size="12pt" fo:language="en" fo:country="US" officeooo:rsid="000be4fd" style:font-size-asian="12pt" style:font-size-complex="12pt"/>
    </style:style>
    <style:style style:name="T15" style:family="text">
      <style:text-properties style:text-position="super 58%" style:font-name="Liberation Serif" fo:font-size="12pt" fo:language="en" fo:country="US" officeooo:rsid="000e03c5" style:font-size-asian="12pt" style:font-size-complex="12pt"/>
    </style:style>
    <style:style style:name="T16" style:family="text">
      <style:text-properties style:text-position="super 58%" officeooo:rsid="000c0e6c"/>
    </style:style>
    <style:style style:name="T17" style:family="text">
      <style:text-properties fo:color="#000080" style:text-position="super 58%" fo:language="en" fo:country="US" style:text-underline-style="solid" style:text-underline-width="auto" style:text-underline-color="font-color" officeooo:rsid="000a0f66" style:language-asian="zxx" style:country-asian="none" style:language-complex="zxx" style:country-complex="none"/>
    </style:style>
    <style:style style:name="T18" style:family="text">
      <style:text-properties officeooo:rsid="000b5391"/>
    </style:style>
    <style:style style:name="T19" style:family="text">
      <style:text-properties officeooo:rsid="000be4fd"/>
    </style:style>
    <style:style style:name="T20" style:family="text">
      <style:text-properties fo:font-variant="normal" fo:text-transform="none" fo:color="#202122" style:font-name="Liberation Serif" fo:font-size="12pt" fo:letter-spacing="normal" fo:language="en" fo:country="US" fo:font-style="normal" fo:font-weight="normal" officeooo:rsid="000be4fd" style:font-size-asian="12pt" style:font-size-complex="12pt"/>
    </style:style>
    <style:style style:name="T21" style:family="text">
      <style:text-properties style:font-name="Liberation Serif" fo:font-size="12pt" style:font-size-asian="12pt" style:font-size-complex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0be4fd" style:font-size-asian="12pt" style:font-size-complex="12pt"/>
    </style:style>
    <style:style style:name="T24" style:family="text">
      <style:text-properties fo:font-size="12pt" officeooo:rsid="000e03c5" style:font-size-asian="12pt" style:font-size-complex="12pt"/>
    </style:style>
    <style:style style:name="T25" style:family="text">
      <style:text-properties officeooo:rsid="000c0e6c"/>
    </style:style>
    <style:style style:name="T26" style:family="text">
      <style:text-properties fo:font-weight="bold" officeooo:rsid="000c0e6c" style:font-weight-asian="bold" style:font-weight-complex="bold"/>
    </style:style>
    <style:style style:name="T27" style:family="text">
      <style:text-properties officeooo:rsid="000e03c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6"><text:tab/>Open letter to famous cryptographers and Bulgarian Cybersecurity officials.</text:span><text:line-break/><text:line-break/>Hello, <text:span text:style-name="T25">Cybersecurity officials</text:span>. As you probably know. We here in Bulgaria are the only country that did not sen<text:span text:style-name="T9">t</text:span> weapons to Ukraine <text:span text:style-name="T25">and did not properly take care for the Ukrainian refugees.</text:span> Popular believe is that our country is run by slaves of <text:span text:style-name="T6">P</text:span><text:span text:style-name="T9">utin.</text:span> But we did not have a <text:span text:style-name="T25">clue how can be done</text:span> until now.</text:p>
      <text:p text:style-name="Standard"/>
      <text:p text:style-name="Standard">In 2011 our government made a mistake, that I can use against them to achieve lustration of all who support <text:span text:style-name="T9">P</text:span>utin openly. How? They introduced <text:span text:style-name="T2">a regulation</text:span> that states that we need to choose a judge to a case in random. I have provided a solution for that before seven years. Nobody, no media, no politician, no academi<text:span text:style-name="T18">c</text:span><text:span text:style-name="T7"> representative</text:span><text:span text:style-name="T5"> </text:span>want to share it openly for seven years. Even this open letter does not make them aware<text:a xlink:type="simple" xlink:href="https://www.academia.edu/80821292/Request_for_citizenship" text:style-name="Internet_20_link" text:visited-style-name="Visited_20_Internet_20_Link"><text:span text:style-name="T10">[1]</text:span></text:a>. A little bit of past: Before the last election I used this hack to make them aware<text:a xlink:type="simple" xlink:href="https://www.facebook.com/preslav.nakov/posts/10159365161202017?comment_id=10159365247717017" text:style-name="Internet_20_link" text:visited-style-name="Visited_20_Internet_20_Link"><text:span text:style-name="T10">[</text:span></text:a><text:a xlink:type="simple" xlink:href="https://www.facebook.com/preslav.nakov/posts/10159365161202017?comment_id=10159365247717017" text:style-name="Internet_20_link" text:visited-style-name="Visited_20_Internet_20_Link"><text:span text:style-name="T17">2</text:span></text:a><text:a xlink:type="simple" xlink:href="https://www.facebook.com/preslav.nakov/posts/10159365161202017?comment_id=10159365247717017" text:style-name="Internet_20_link" text:visited-style-name="Visited_20_Internet_20_Link"><text:span text:style-name="T10">]</text:span></text:a>. Mister Bozhanov is our minister of electronic government now. He does not reach me back to give him the code for 4<text:span text:style-name="T27">6</text:span> weeks. In the comments shared above, he pretends openly that there is a need for changes in the law. But <text:span text:style-name="T18">the</text:span> solution<text:a xlink:type="simple" xlink:href="https://www.academia.edu/79703805/Secure_Distributed_Random_Number_Generator" text:style-name="Internet_20_link" text:visited-style-name="Visited_20_Internet_20_Link"><text:span text:style-name="T13">[3]</text:span></text:a> is designed to be compliant with the current regulation. And the solution <text:span text:style-name="T19">in usage</text:span> is not compliant and the audit of it is classified<text:a xlink:type="simple" xlink:href="https://judicialreports.bg/2020/04/всс-засекрети-одита-за-случайното-раз/" text:style-name="Internet_20_link" text:visited-style-name="Visited_20_Internet_20_Link"><text:span text:style-name="T16">[4]</text:span></text:a>. The EU commission mention that problem in <text:span text:style-name="T19">almost </text:span>every six month paper about the monitoring of our Country. Still nobody cares. Here is the current regulation<text:a xlink:type="simple" xlink:href="https://www.justice.government.bg/home/normdoc/2135560660" text:style-name="Internet_20_link" text:visited-style-name="Visited_20_Internet_20_Link"><text:span text:style-name="T11">[</text:span></text:a><text:a xlink:type="simple" xlink:href="https://www.justice.government.bg/home/normdoc/2135560660" text:style-name="Internet_20_link" text:visited-style-name="Visited_20_Internet_20_Link"><text:span text:style-name="T12">5</text:span></text:a><text:a xlink:type="simple" xlink:href="https://www.justice.government.bg/home/normdoc/2135560660" text:style-name="Internet_20_link" text:visited-style-name="Visited_20_Internet_20_Link"><text:span text:style-name="T11">]</text:span></text:a><text:span text:style-name="T19">.</text:span></text:p>
      <text:p text:style-name="Standard"/>
      <text:p text:style-name="Standard">Now you can say. What is the matter the system depends on personnel not on regulation. Well but the <text:span text:style-name="T25">personnel</text:span> are even more <text:span text:style-name="T25">jeopardized</text:span> not just in the justice department but in all government systems. There is a public topic about it. But I have a <text:span text:style-name="T25">clue how</text:span>:</text:p>
      <text:p text:style-name="Standard"/>
      <text:p text:style-name="P3">I have contacted the "<text:span text:style-name="T8">I</text:span>nformation <text:span text:style-name="T19">S</text:span>ervices"<text:a xlink:type="simple" xlink:href="https://www.is-bg.net/bg/" text:style-name="Internet_20_link" text:visited-style-name="Visited_20_Internet_20_Link"><text:span text:style-name="T11">[</text:span></text:a><text:a xlink:type="simple" xlink:href="https://www.is-bg.net/bg/" text:style-name="Internet_20_link" text:visited-style-name="Visited_20_Internet_20_Link"><text:span text:style-name="T12">6</text:span></text:a><text:a xlink:type="simple" xlink:href="https://www.is-bg.net/bg/" text:style-name="Internet_20_link" text:visited-style-name="Visited_20_Internet_20_Link"><text:span text:style-name="T11">]</text:span></text:a>. They are public-private company that builds and support almost all or all the public information systems in Bulgaria. Simple hack. I have applied for a position that I do not have any experience for and on the interview I have asked some questions. <text:span text:style-name="T19">First:</text:span> Did you have team of cryptographers? They replied: N<text:span text:style-name="T19">o</text:span>. Then I have asked: <text:span text:style-name="T19">D</text:span>id you have any security model for any system of yours. They replied: N<text:span text:style-name="T19">o</text:span>. Really there cannot be <text:span text:style-name="T1">a complete</text:span> audit to <text:span text:style-name="T1">an information</text:span> system without security model. Without key management <text:span text:style-name="T19">service, private key generation service and separation of responsibilities security model, </text:span>nobody can know where, how, why and whom has done <text:span text:style-name="T22">something in </text:span><text:span text:style-name="T23">some</text:span><text:span text:style-name="T22"> system. </text:span><text:span text:style-name="T24">Even the traces can be easily erased by insiders. Then the law that regulates the internet providers to keep the traffic data become irrelevant. </text:span><text:span text:style-name="T22">But the real problem is that cryptography first law and reason for existence is that: There is no secrecy/secur</text:span><text:span text:style-name="T21">ity based on secret. The keys needs to be in secret, but if the solution is secretive, it is not a solution at all. </text:span><text:span text:style-name="T20">System security should not depend on the secrecy of the implementation or its components.</text:span><text:a xlink:type="simple" xlink:href="https://nvlpubs.nist.gov/nistpubs/Legacy/SP/nistspecialpublication800-123.pdf" text:style-name="Internet_20_link" text:visited-style-name="Visited_20_Internet_20_Link"><text:span text:style-name="T14">[</text:span></text:a><text:a xlink:type="simple" xlink:href="https://nvlpubs.nist.gov/nistpubs/Legacy/SP/nistspecialpublication800-123.pdf" text:style-name="Internet_20_link" text:visited-style-name="Visited_20_Internet_20_Link"><text:span text:style-name="T15">7</text:span></text:a><text:a xlink:type="simple" xlink:href="https://nvlpubs.nist.gov/nistpubs/Legacy/SP/nistspecialpublication800-123.pdf" text:style-name="Internet_20_link" text:visited-style-name="Visited_20_Internet_20_Link"><text:span text:style-name="T14">]</text:span></text:a></text:p>
      <text:p text:style-name="P4"/>
      <text:p text:style-name="P1"><text:span text:style-name="T27">Under hybrid warfare it is good to have transparency to protect the public confidence in the governmental systems. The exact goal of a hybrid warfare is to corrupt the common trust in the society that is under attack. Here this hybrid attack can come even from inside the obscured systems. P</text:span>robably this is the way <text:span text:style-name="T9">P</text:span>utin control Bulgaria by using compromising materials against all <text:span text:style-name="T27">public officials</text:span> here.<text:line-break/></text:p>
      <text:p text:style-name="P1"><text:span text:style-name="T4">1. </text:span><text:a xlink:type="simple" xlink:href="https://www.academia.edu/80821292/Request_for_citizenship" text:style-name="Internet_20_link" text:visited-style-name="Visited_20_Internet_20_Link">https://www.academia.edu/80821292/Request_for_citizenship</text:a><text:line-break/><text:span text:style-name="T3">2</text:span><text:span text:style-name="T18">. </text:span><text:a xlink:type="simple" xlink:href="https://www.facebook.com/preslav.nakov/posts/10159365161202017?comment_id=10159365247717017" text:style-name="Internet_20_link" text:visited-style-name="Visited_20_Internet_20_Link"><text:span text:style-name="T18">https://www.facebook.com/preslav.nakov/posts/10159365161202017?comment_id=10159365247717017</text:span></text:a></text:p>
      <text:p text:style-name="P2">3. <text:a xlink:type="simple" xlink:href="https://www.academia.edu/79703805/Secure_Distributed_Random_Number_Generator" text:style-name="Internet_20_link" text:visited-style-name="Visited_20_Internet_20_Link">https://www.academia.edu/79703805/Secure_Distributed_Random_Number_Generator</text:a></text:p>
      <text:p text:style-name="P6">4. <text:a xlink:type="simple" xlink:href="https://judicialreports.bg/2020/04/всс-засекрети-одита-за-случайното-раз/" text:style-name="Internet_20_link" text:visited-style-name="Visited_20_Internet_20_Link">https://judicialreports.bg/</text:a></text:p>
      <text:p text:style-name="P2"><text:span text:style-name="T27">5</text:span>. <text:a xlink:type="simple" xlink:href="https://www.justice.government.bg/home/normdoc/2135560660" text:style-name="Internet_20_link" text:visited-style-name="Visited_20_Internet_20_Link">https://www.justice.government.bg/home/normdoc/2135560660</text:a></text:p>
      <text:p text:style-name="P2"><text:span text:style-name="T27">6</text:span>. <text:a xlink:type="simple" xlink:href="https://www.is-bg.net/bg/" text:style-name="Internet_20_link" text:visited-style-name="Visited_20_Internet_20_Link">https://www.is-bg.net/bg/</text:a></text:p>
      <text:p text:style-name="P2"><text:span text:style-name="T27">7</text:span>. <text:a xlink:type="simple" xlink:href="https://nvlpubs.nist.gov/nistpubs/Legacy/SP/nistspecialpublication800-123.pdf" text:style-name="Internet_20_link" text:visited-style-name="Visited_20_Internet_20_Link">https://nvlpubs.nist.gov/nistpubs/Legacy/SP/nistspecialpublication800-123.pdf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06T13:45:16.335000000</meta:creation-date>
    <dc:date>2022-06-13T19:42:44.184000000</dc:date>
    <meta:editing-duration>P7DT6M30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1" meta:word-count="581" meta:character-count="3728" meta:non-whitespace-character-count="3155"/>
  </office:meta>
</office:document-meta>
</file>